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1000000DE7964AAB295E994B8.png" manifest:media-type="image/png"/>
  <manifest:file-entry manifest:full-path="Pictures/100000010000019E000000AC2729B58136DE679A.png" manifest:media-type="image/png"/>
  <manifest:file-entry manifest:full-path="Pictures/10000001000005F3000000F4E0FCE7B0B133C2CD.png" manifest:media-type="image/png"/>
  <manifest:file-entry manifest:full-path="Pictures/10000001000002C4000001542BB88A11B4EE2CD1.png" manifest:media-type="image/png"/>
  <manifest:file-entry manifest:full-path="Pictures/1000000100000429000000836512C36D0C288478.png" manifest:media-type="image/png"/>
  <manifest:file-entry manifest:full-path="Pictures/10000001000001740000005FE424FAF7D7429F98.png" manifest:media-type="image/png"/>
  <manifest:file-entry manifest:full-path="Pictures/10000001000001CE00000053570E12A196E1903D.png" manifest:media-type="image/png"/>
  <manifest:file-entry manifest:full-path="Pictures/100000010000034B000000C21D14AF13A744A8EE.png" manifest:media-type="image/png"/>
  <manifest:file-entry manifest:full-path="Pictures/1000000100000250000000B0433AD9E780A7EFFC.png" manifest:media-type="image/png"/>
  <manifest:file-entry manifest:full-path="Pictures/10000001000003930000010B02DB44A927EA8078.png" manifest:media-type="image/png"/>
  <manifest:file-entry manifest:full-path="Pictures/10000001000002B100000059611F4B6A52572AF0.png" manifest:media-type="image/png"/>
  <manifest:file-entry manifest:full-path="Pictures/10000001000002B200000040C84426D3640D36F5.png" manifest:media-type="image/png"/>
  <manifest:file-entry manifest:full-path="Pictures/10000001000005F60000008199A26D032B264797.png" manifest:media-type="image/png"/>
  <manifest:file-entry manifest:full-path="Pictures/10000001000002D6000000D0293D50C8656A4CD7.png" manifest:media-type="image/png"/>
  <manifest:file-entry manifest:full-path="Pictures/100000010000032A000001C9CB986FA73BA1A61F.png" manifest:media-type="image/png"/>
  <manifest:file-entry manifest:full-path="Pictures/10000001000001C600000048790182A7B1754F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7db2"/>
    </style:style>
    <style:style style:name="P2" style:family="paragraph" style:parent-style-name="Standard">
      <style:text-properties officeooo:rsid="000e0ed5" officeooo:paragraph-rsid="000e0ed5"/>
    </style:style>
    <style:style style:name="P3" style:family="paragraph" style:parent-style-name="Standard">
      <style:text-properties officeooo:paragraph-rsid="000e0ed5"/>
    </style:style>
    <style:style style:name="P4" style:family="paragraph" style:parent-style-name="Standard">
      <style:text-properties officeooo:paragraph-rsid="00117979"/>
    </style:style>
    <style:style style:name="P5" style:family="paragraph" style:parent-style-name="Standard">
      <style:text-properties officeooo:rsid="000e0ed5" officeooo:paragraph-rsid="000e0ed5"/>
    </style:style>
    <style:style style:name="P6" style:family="paragraph" style:parent-style-name="Standard">
      <style:text-properties officeooo:paragraph-rsid="00117979"/>
    </style:style>
    <style:style style:name="T1" style:family="text">
      <style:text-properties officeooo:rsid="000fe8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fconfig</text:p>
      <text:p text:style-name="Standard"><draw:frame draw:style-name="fr2" draw:name="Image1" text:anchor-type="char" svg:x="0.095cm" svg:y="0cm" svg:width="15.752cm" svg:height="7.564cm" draw:z-index="0"><draw:image xlink:href="Pictures/10000001000002C4000001542BB88A11B4EE2CD1.png" xlink:type="simple" xlink:show="embed" xlink:actuate="onLoad" draw:mime-type="image/png"/></draw:frame></text:p>
      <text:p text:style-name="P1">ifplugstatus</text:p>
      <text:p text:style-name="P1"><draw:frame draw:style-name="fr2" draw:name="Image2" text:anchor-type="char" svg:x="0.06cm" svg:y="0.198cm" svg:width="9.843cm" svg:height="2.514cm" draw:z-index="1"><draw:image xlink:href="Pictures/10000001000001740000005FE424FAF7D7429F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iftop</text:p>
      <text:p text:style-name="P1"><draw:frame draw:style-name="fr1" draw:name="Image3" text:anchor-type="char" svg:width="17cm" svg:height="2.09cm" draw:z-index="2"><draw:image xlink:href="Pictures/1000000100000429000000836512C36D0C288478.png" xlink:type="simple" xlink:show="embed" xlink:actuate="onLoad" draw:mime-type="image/png"/></draw:frame></text:p>
      <text:p text:style-name="P2">ping sjcetpalai.ac.in</text:p>
      <text:p text:style-name="P1"><draw:frame draw:style-name="fr1" draw:name="Image4" text:anchor-type="char" svg:width="17cm" svg:height="3.911cm" draw:z-index="3"><draw:image xlink:href="Pictures/100000010000034B000000C21D14AF13A744A8EE.png" xlink:type="simple" xlink:show="embed" xlink:actuate="onLoad" draw:mime-type="image/png"/></draw:frame></text:p>
      <text:p text:style-name="P2">ip addr</text:p>
      <text:p text:style-name="Standard"><draw:frame draw:style-name="fr2" draw:name="Image5" text:anchor-type="char" svg:x="0.069cm" svg:y="0.048cm" svg:width="16.492cm" svg:height="4.812cm" draw:z-index="4"><draw:image xlink:href="Pictures/10000001000003930000010B02DB44A927EA8078.png" xlink:type="simple" xlink:show="embed" xlink:actuate="onLoad" draw:mime-type="image/png"/></draw:frame></text:p>
      <text:p text:style-name="Standard"><text:soft-page-break/>traceroute 172.16.162.124</text:p>
      <text:p text:style-name="Standard"><draw:frame draw:style-name="fr1" draw:name="Image6" text:anchor-type="char" svg:width="17cm" svg:height="2.194cm" draw:z-index="5"><draw:image xlink:href="Pictures/10000001000002B100000059611F4B6A52572AF0.png" xlink:type="simple" xlink:show="embed" xlink:actuate="onLoad" draw:mime-type="image/png"/></draw:frame></text:p>
      <text:p text:style-name="P3">mtr 172.16.162.124</text:p>
      <text:p text:style-name="Standard"><draw:frame draw:style-name="fr1" draw:name="Image7" text:anchor-type="char" svg:width="17cm" svg:height="1.436cm" draw:z-index="6"><draw:image xlink:href="Pictures/10000001000005F60000008199A26D032B264797.png" xlink:type="simple" xlink:show="embed" xlink:actuate="onLoad" draw:mime-type="image/png"/></draw:frame><text:line-break/>netstat -<text:span text:style-name="T1">t</text:span></text:p>
      <text:p text:style-name="Standard"><draw:frame draw:style-name="fr1" draw:name="Image8" text:anchor-type="char" svg:width="17cm" svg:height="4.87cm" draw:z-index="7"><draw:image xlink:href="Pictures/10000001000002D6000000D0293D50C8656A4CD7.png" xlink:type="simple" xlink:show="embed" xlink:actuate="onLoad" draw:mime-type="image/png"/></draw:frame><text:line-break/>whois <text:span text:style-name="T1">google.com</text:span></text:p>
      <text:p text:style-name="P4"><draw:frame draw:style-name="fr1" draw:name="Image9" text:anchor-type="char" svg:width="17cm" svg:height="9.59cm" draw:z-index="8"><draw:image xlink:href="Pictures/100000010000032A000001C9CB986FA73BA1A61F.png" xlink:type="simple" xlink:show="embed" xlink:actuate="onLoad" draw:mime-type="image/png"/></draw:frame><text:line-break/></text:p>
      <text:p text:style-name="P4"/>
      <text:p text:style-name="P4"/>
      <text:p text:style-name="P4">nmap -F 172.16.162.124</text:p>
      <text:p text:style-name="Standard"><draw:frame draw:style-name="fr2" draw:name="Image10" text:anchor-type="char" svg:x="0.007cm" svg:y="0.318cm" svg:width="15.663cm" svg:height="4.657cm" draw:z-index="9"><draw:image xlink:href="Pictures/1000000100000250000000B0433AD9E780A7EFFC.png" xlink:type="simple" xlink:show="embed" xlink:actuate="onLoad" draw:mime-type="image/png"/></draw:frame><text:soft-page-break/></text:p>
      <text:p text:style-name="Standard">nmcli device status</text:p>
      <text:p text:style-name="Standard"><draw:frame draw:style-name="fr2" draw:name="Image11" text:anchor-type="char" svg:x="0.086cm" svg:y="0cm" svg:width="12.012cm" svg:height="1.905cm" draw:z-index="10"><draw:image xlink:href="Pictures/10000001000001C600000048790182A7B1754F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4">nmcli connection show</text:p>
      <text:p text:style-name="P4"><draw:frame draw:style-name="fr2" draw:name="Image12" text:anchor-type="char" svg:x="0cm" svg:y="0cm" svg:width="17cm" svg:height="1.575cm" draw:z-index="11"><draw:image xlink:href="Pictures/10000001000002B200000040C84426D3640D36F5.png" xlink:type="simple" xlink:show="embed" xlink:actuate="onLoad" draw:mime-type="image/png"/></draw:frame><text:line-break/>speedtest-cli –simple</text:p>
      <text:p text:style-name="P4"><draw:frame draw:style-name="fr2" draw:name="Image13" text:anchor-type="char" svg:x="-0.019cm" svg:y="0cm" svg:width="12.224cm" svg:height="2.196cm" draw:z-index="12"><draw:image xlink:href="Pictures/10000001000001CE00000053570E12A196E1903D.png" xlink:type="simple" xlink:show="embed" xlink:actuate="onLoad" draw:mime-type="image/png"/></draw:frame><text:line-break/><text:line-break/><text:line-break/><text:line-break/><text:line-break/><text:line-break/>bmon -p enp2s0</text:p>
      <text:p text:style-name="P4"><draw:frame draw:style-name="fr1" draw:name="Image14" text:anchor-type="char" svg:width="17cm" svg:height="2.723cm" draw:z-index="13"><draw:image xlink:href="Pictures/10000001000005F3000000F4E0FCE7B0B133C2CD.png" xlink:type="simple" xlink:show="embed" xlink:actuate="onLoad" draw:mime-type="image/png"/></draw:frame><text:line-break/>nslookup google.com</text:p>
      <text:p text:style-name="P4"><draw:frame draw:style-name="fr2" draw:name="Image15" text:anchor-type="char" svg:x="0.086cm" svg:y="0.185cm" svg:width="10.954cm" svg:height="4.551cm" draw:z-index="14"><draw:image xlink:href="Pictures/100000010000019E000000AC2729B58136DE679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/text:p>
      <text:p text:style-name="P4"/>
      <text:p text:style-name="P4"/>
      <text:p text:style-name="P4"/>
      <text:p text:style-name="P4"><text:soft-page-break/>sudo tcpdump -i enp2s0</text:p>
      <text:p text:style-name="P4"><draw:frame draw:style-name="fr1" draw:name="Image16" text:anchor-type="char" svg:width="17cm" svg:height="2.48cm" draw:z-index="15"><draw:image xlink:href="Pictures/10000001000005F1000000DE7964AAB295E994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0T14:22:01.897931027</meta:creation-date>
    <dc:date>2026-07-10T16:00:54.050319476</dc:date>
    <meta:editing-duration>PT9M2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4" meta:paragraph-count="18" meta:word-count="35" meta:character-count="282" meta:non-whitespace-character-count="241"/>
  </office:meta>
</office:document-meta>
</file>